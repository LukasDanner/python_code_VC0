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05.76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64.06pt"/>
    </style:style>
    <style:style style:name="co4" style:family="table-column">
      <style:table-column-properties fo:break-before="auto" style:column-width="101.11pt"/>
    </style:style>
    <style:style style:name="co5" style:family="table-column">
      <style:table-column-properties fo:break-before="auto" style:column-width="43.9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pt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3"/>
        <table:table-column table:style-name="co2" table:default-cell-style-name="Default"/>
        <table:table-column table:style-name="co4" table:number-columns-repeated="2" table:default-cell-style-name="Default"/>
        <table:table-column table:style-name="co2" table:default-cell-style-name="Default"/>
        <table:table-column table:style-name="co5" table:default-cell-style-name="ce3"/>
        <table:table-column table:style-name="co4" table:default-cell-style-name="Default"/>
        <table:table-column table:style-name="co2" table:number-columns-repeated="2" table:default-cell-style-name="Default"/>
        <table:table-column table:style-name="co2" table:default-cell-style-name="ce3"/>
        <table:table-row table:style-name="ro1">
          <table:table-cell table:style-name="ce1" office:value-type="string" calcext:value-type="string">
            <text:p>Natural constants </text:p>
          </table:table-cell>
          <table:table-cell table:style-name="ce2" office:value-type="string" calcext:value-type="string">
            <text:p>value</text:p>
          </table:table-cell>
          <table:table-cell table:style-name="ce2" office:value-type="string" calcext:value-type="string">
            <text:p>unit</text:p>
          </table:table-cell>
          <table:table-cell/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Code Unit 1</text:p>
          </table:table-cell>
          <table:table-cell table:style-name="ce2" office:value-type="string" calcext:value-type="string">
            <text:p>value</text:p>
          </table:table-cell>
          <table:table-cell table:style-name="ce2" office:value-type="string" calcext:value-type="string">
            <text:p>unit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Code Unit 2</text:p>
          </table:table-cell>
          <table:table-cell table:style-name="ce2" office:value-type="string" calcext:value-type="string">
            <text:p>value</text:p>
          </table:table-cell>
          <table:table-cell table:style-name="ce2" office:value-type="string" calcext:value-type="string">
            <text:p>unit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table:formula="of:=1.602 * 10^(-19)" office:value-type="float" office:value="1.602E-019" calcext:value-type="float">
            <text:p>1.602E-19</text:p>
          </table:table-cell>
          <table:table-cell office:value-type="string" calcext:value-type="string">
            <text:p>As</text:p>
          </table:table-cell>
          <table:table-cell/>
          <table:table-cell office:value-type="string" calcext:value-type="string">
            <text:p>frequency</text:p>
          </table:table-cell>
          <table:table-cell office:value-type="string" calcext:value-type="string">
            <text:p>w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requenc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bar </text:p>
          </table:table-cell>
          <table:table-cell table:formula="of:=1.054 * 10^(-34)" office:value-type="float" office:value="1.054E-034" calcext:value-type="float">
            <text:p>1.054E-34</text:p>
          </table:table-cell>
          <table:table-cell office:value-type="string" calcext:value-type="string">
            <text:p>AVs^2</text:p>
          </table:table-cell>
          <table:table-cell/>
          <table:table-cell office:value-type="string" calcext:value-type="string">
            <text:p>magnetic field</text:p>
          </table:table-cell>
          <table:table-cell office:value-type="string" calcext:value-type="string">
            <text:p>w0/gamma</text:p>
          </table:table-cell>
          <table:table-cell table:formula="of:=[.B11]/[.B5]" office:value-type="float" office:value="0.567903454386781" calcext:value-type="float">
            <text:p>0.56790345438678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magnetic fiel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B</text:p>
          </table:table-cell>
          <table:table-cell table:formula="of:=1.308 * 10^(-23)" office:value-type="float" office:value="1.308E-023" calcext:value-type="float">
            <text:p>1.308E-23</text:p>
          </table:table-cell>
          <table:table-cell office:value-type="string" calcext:value-type="string">
            <text:p>J/K</text:p>
          </table:table-cell>
          <table:table-cell/>
          <table:table-cell office:value-type="string" calcext:value-type="string">
            <text:p>voltage </text:p>
          </table:table-cell>
          <table:table-cell office:value-type="string" calcext:value-type="string">
            <text:p>IB/Gmo</text:p>
          </table:table-cell>
          <table:table-cell table:formula="of:=[.B13] / ([.B14])" office:value-type="float" office:value="0.4" calcext:value-type="float">
            <text:p>0.4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voltage </text:p>
          </table:table-cell>
          <table:table-cell office:value-type="string" calcext:value-type="string">
            <text:p>hbar w0 / e</text:p>
          </table:table-cell>
          <table:table-cell table:formula="of:=[.B3]*[.B11] / [.B2] * 10^12" office:value-type="float" office:value="0.065792759051186" calcext:value-type="float">
            <text:p>0.065792759051186</text:p>
          </table:table-cell>
          <table:table-cell office:value-type="string" calcext:value-type="string">
            <text:p>fV</text:p>
          </table:table-cell>
        </table:table-row>
        <table:table-row table:style-name="ro1">
          <table:table-cell office:value-type="string" calcext:value-type="string">
            <text:p>gamma </text:p>
          </table:table-cell>
          <table:table-cell table:formula="of:=28.025 * 2 *PI()" office:value-type="float" office:value="176.086268233708" calcext:value-type="float">
            <text:p>176.086268233708</text:p>
          </table:table-cell>
          <table:table-cell office:value-type="string" calcext:value-type="string">
            <text:p>10^9/s</text:p>
          </table:table-cell>
          <table:table-cell/>
          <table:table-cell office:value-type="string" calcext:value-type="string">
            <text:p>conductance</text:p>
          </table:table-cell>
          <table:table-cell office:value-type="string" calcext:value-type="string">
            <text:p>e IB /(hbar w0)</text:p>
          </table:table-cell>
          <table:table-cell table:formula="of:=[.B2]*[.B13]*10^(-12) /[.B3]/[.B11]" office:value-type="float" office:value="30.3984819734345" calcext:value-type="float">
            <text:p>30.3984819734345</text:p>
          </table:table-cell>
          <table:table-cell office:value-type="string" calcext:value-type="string">
            <text:p>1/Ohm</text:p>
          </table:table-cell>
          <table:table-cell office:value-type="string" calcext:value-type="string">
            <text:p>conductance</text:p>
          </table:table-cell>
          <table:table-cell office:value-type="string" calcext:value-type="string">
            <text:p>1/RQ</text:p>
          </table:table-cell>
          <table:table-cell table:formula="of:=10^3/[.B7]" office:value-type="float" office:value="0.243491840607211" calcext:value-type="float">
            <text:p>0.243491840607211</text:p>
          </table:table-cell>
          <table:table-cell office:value-type="string" calcext:value-type="string">
            <text:p>10^-3/Ohm</text:p>
          </table:table-cell>
        </table:table-row>
        <table:table-row table:style-name="ro1">
          <table:table-cell office:value-type="string" calcext:value-type="string">
            <text:p>mu0</text:p>
          </table:table-cell>
          <table:table-cell table:formula="of:=1.257 * 10^(-6)" office:value-type="float" office:value="0.000001257" calcext:value-type="float">
            <text:p>1.257E-06</text:p>
          </table:table-cell>
          <table:table-cell office:value-type="string" calcext:value-type="string">
            <text:p>Tm/A</text:p>
          </table:table-cell>
          <table:table-cell/>
          <table:table-cell office:value-type="string" calcext:value-type="string">
            <text:p>length</text:p>
          </table:table-cell>
          <table:table-cell office:value-type="string" calcext:value-type="string">
            <text:p>mu0 IB gamma / w0</text:p>
          </table:table-cell>
          <table:table-cell table:formula="of:=10^(-3) * [.B6]*[.B5]*[.B13]/[.B11] * 10^(9)" office:value-type="float" office:value="4.42680878339542" calcext:value-type="float">
            <text:p>4.42680878339542</text:p>
          </table:table-cell>
          <table:table-cell office:value-type="string" calcext:value-type="string">
            <text:p>nm</text:p>
          </table:table-cell>
          <table:table-cell office:value-type="string" calcext:value-type="string">
            <text:p>lengt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Q = hbar / e^2</text:p>
          </table:table-cell>
          <table:table-cell table:formula="of:=[.B3] / [.B2] / [.B2]" office:value-type="float" office:value="4106.91379845106" calcext:value-type="float">
            <text:p>4106.91379845106</text:p>
          </table:table-cell>
          <table:table-cell office:value-type="string" calcext:value-type="string">
            <text:p>Ohm</text:p>
          </table:table-cell>
          <table:table-cell/>
          <table:table-cell office:value-type="string" calcext:value-type="string">
            <text:p>current </text:p>
          </table:table-cell>
          <table:table-cell office:value-type="string" calcext:value-type="string">
            <text:p>IB</text:p>
          </table:table-cell>
          <table:table-cell table:formula="of:=[.B13]" office:value-type="float" office:value="2" calcext:value-type="float">
            <text:p>2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current </text:p>
          </table:table-cell>
          <table:table-cell office:value-type="string" calcext:value-type="string">
            <text:p>e w0</text:p>
          </table:table-cell>
          <table:table-cell table:formula="of:=[.B2]*[.B11] * 10^18" office:value-type="float" office:value="16.02" calcext:value-type="float">
            <text:p>16.02</text:p>
          </table:table-cell>
          <table:table-cell office:value-type="string" calcext:value-type="string">
            <text:p>nA</text:p>
          </table:table-cell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style-name="ce1" office:value-type="string" calcext:value-type="string">
            <text:p>Circuit Parameters</text:p>
          </table:table-cell>
          <table:table-cell table:number-columns-repeated="4"/>
          <table:table-cell table:style-name="ce1" office:value-type="string" calcext:value-type="string">
            <text:p>Dimensionless Code Parameter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0 (eigenfrequency)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0^9/s</text:p>
          </table:table-cell>
          <table:table-cell/>
          <table:table-cell office:value-type="string" calcext:value-type="string">
            <text:p>Oscillation Period </text:p>
          </table:table-cell>
          <table:table-cell/>
          <table:table-cell table:formula="of:=2 * PI() / [.B11]" office:value-type="float" office:value="0.0628318530717959" calcext:value-type="float">
            <text:p>0.062831853071796</text:p>
          </table:table-cell>
          <table:table-cell office:value-type="string" calcext:value-type="string">
            <text:p>n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T (Temperature)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temperature</text:p>
          </table:table-cell>
          <table:table-cell office:value-type="string" calcext:value-type="string">
            <text:p>kB T / (hbar w0)</text:p>
          </table:table-cell>
          <table:table-cell table:formula="of:=[.B4]*[.B12]/[.B3]/10^9 / [.B11]" office:value-type="float" office:value="372.296015180266" calcext:value-type="float">
            <text:p>372.296015180266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B (bias current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</text:p>
          </table:table-cell>
          <table:table-cell/>
          <table:table-cell office:value-type="string" calcext:value-type="string">
            <text:p>bias current </text:p>
          </table:table-cell>
          <table:table-cell office:value-type="string" calcext:value-type="string">
            <text:p>IB / I2</text:p>
          </table:table-cell>
          <table:table-cell table:formula="of:=[.B13]/[.K7]" office:value-type="float" office:value="0.124843945068664" calcext:value-type="float">
            <text:p>0.124843945068664</text:p>
          </table:table-cell>
          <table:table-cell office:value-type="string" calcext:value-type="string">
            <text:p>10^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mo (TMOS cond.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^-3 /Ohm</text:p>
          </table:table-cell>
          <table:table-cell/>
          <table:table-cell office:value-type="string" calcext:value-type="string">
            <text:p>conductance</text:p>
          </table:table-cell>
          <table:table-cell office:value-type="string" calcext:value-type="string">
            <text:p>Gmo / G1</text:p>
          </table:table-cell>
          <table:table-cell table:formula="of:=[.B14]*10^-3/[.G5]" office:value-type="float" office:value="0.000164481897627965" calcext:value-type="float">
            <text:p>0.0001644818976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ductance</text:p>
          </table:table-cell>
          <table:table-cell office:value-type="string" calcext:value-type="string">
            <text:p>Gmo / G2</text:p>
          </table:table-cell>
          <table:table-cell table:formula="of:=[.B14]/[.K5]" office:value-type="float" office:value="20.5345689922553" calcext:value-type="float">
            <text:p>20.534568992255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number of spins</text:p>
          </table:table-cell>
          <table:table-cell office:value-type="string" calcext:value-type="string">
            <text:p>Nspins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0^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pin relax. time T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s</text:p>
          </table:table-cell>
          <table:table-cell/>
          <table:table-cell office:value-type="string" calcext:value-type="string">
            <text:p>Spin relax. time T1</text:p>
          </table:table-cell>
          <table:table-cell office:value-type="string" calcext:value-type="string">
            <text:p>T1 w0</text:p>
          </table:table-cell>
          <table:table-cell table:formula="of:=[.B16]*[.B11]"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pin relax. time T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s</text:p>
          </table:table-cell>
          <table:table-cell/>
          <table:table-cell office:value-type="string" calcext:value-type="string">
            <text:p>Spin relax. time T2</text:p>
          </table:table-cell>
          <table:table-cell office:value-type="string" calcext:value-type="string">
            <text:p>T2 w0</text:p>
          </table:table-cell>
          <table:table-cell table:formula="of:=[.B17]*[.B11]"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il radiu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^-6 m</text:p>
          </table:table-cell>
          <table:table-cell/>
          <table:table-cell office:value-type="string" calcext:value-type="string">
            <text:p>Coil radius</text:p>
          </table:table-cell>
          <table:table-cell office:value-type="string" calcext:value-type="string">
            <text:p>r / r1</text:p>
          </table:table-cell>
          <table:table-cell table:formula="of:=[.B18]/[.G6] * 1000" office:value-type="float" office:value="1129.48181063401" calcext:value-type="float">
            <text:p>1129.48181063401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/>
          <table:table-cell office:value-type="string" calcext:value-type="string">
            <text:p>r_eff (single loop)</text:p>
          </table:table-cell>
          <table:table-cell office:value-type="string" calcext:value-type="string">
            <text:p>r1 /(2r)</text:p>
          </table:table-cell>
          <table:table-cell table:formula="of:=[.G6]/(2 *[.B18])/1000" office:value-type="float" office:value="0.000442680878339542" calcext:value-type="float">
            <text:p>0.00044268087834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winding density 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10^6/m</text:p>
          </table:table-cell>
          <table:table-cell/>
          <table:table-cell office:value-type="string" calcext:value-type="string">
            <text:p>r_eff (long coil)</text:p>
          </table:table-cell>
          <table:table-cell office:value-type="string" calcext:value-type="string">
            <text:p>R1 * nwind</text:p>
          </table:table-cell>
          <table:table-cell table:formula="of:=[.B20]*[.G6]*10^(6) *10^(-9)" office:value-type="float" office:value="0.00442680878339542" calcext:value-type="float">
            <text:p>0.004426808783395</text:p>
          </table:table-cell>
          <table:table-cell table:style-name="Default"/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external B0-field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Larmor frequency </text:p>
          </table:table-cell>
          <table:table-cell office:value-type="string" calcext:value-type="string">
            <text:p>gamma B0 / w0</text:p>
          </table:table-cell>
          <table:table-cell table:formula="of:=[.B22]/[.G3]" office:value-type="float" office:value="0.44021567058427" calcext:value-type="float">
            <text:p>0.44021567058427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effective coupling K</text:p>
          </table:table-cell>
          <table:table-cell office:value-type="string" calcext:value-type="string">
            <text:p>K</text:p>
          </table:table-cell>
          <table:table-cell table:formula="of:=[.G15]*10^(12)/4 /[.G12] * [.G22]*[.G14]*[.G19] /[.G13] / 10^6" office:value-type="float" office:value="0.00482743613931407" calcext:value-type="float">
            <text:p>0.004827436139314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style-name="ce1" office:value-type="string" calcext:value-type="string">
            <text:p>Reverse Calculations</text:p>
          </table:table-cell>
          <table:table-cell table:style-name="ce2" office:value-type="string" calcext:value-type="string">
            <text:p>value</text:p>
          </table:table-cell>
          <table:table-cell table:style-name="ce2" office:value-type="string" calcext:value-type="string">
            <text:p>unit</text:p>
          </table:table-cell>
          <table:table-cell/>
          <table:table-cell table:style-name="ce1" office:value-type="string" calcext:value-type="string">
            <text:p>Physical Units </text:p>
          </table:table-cell>
          <table:table-cell table:style-name="ce2" office:value-type="string" calcext:value-type="string">
            <text:p>value</text:p>
          </table:table-cell>
          <table:table-cell table:style-name="ce2" office:value-type="string" calcext:value-type="string">
            <text:p>uni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temperature</text:p>
          </table:table-cell>
          <table:table-cell table:formula="of:=[.B28]" office:value-type="float" office:value="300" calcext:value-type="float">
            <text:p>300</text:p>
          </table:table-cell>
          <table:table-cell table:style-name="ce3" office:value-type="string" calcext:value-type="string">
            <text:p>K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b T /(hbar w0)</text:p>
          </table:table-cell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w0</text:p>
          </table:table-cell>
          <table:table-cell table:formula="of:=[.B4]*[.B28]/[.B3]/[.B29]*10^(-9)" office:value-type="float" office:value="148.918406072106" calcext:value-type="float">
            <text:p>148.918406072106</text:p>
          </table:table-cell>
          <table:table-cell table:style-name="ce3" office:value-type="string" calcext:value-type="string">
            <text:p>10^9 / 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1 w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1</text:p>
          </table:table-cell>
          <table:table-cell table:formula="of:=[.B30]/[.F29]" office:value-type="float" office:value="6.71508664627931" calcext:value-type="float">
            <text:p>6.71508664627931</text:p>
          </table:table-cell>
          <table:table-cell table:style-name="ce3" office:value-type="string" calcext:value-type="string">
            <text:p>n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2 w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2</text:p>
          </table:table-cell>
          <table:table-cell table:formula="of:=[.B31]/[.F29]" office:value-type="float" office:value="6.71508664627931" calcext:value-type="float">
            <text:p>6.71508664627931</text:p>
          </table:table-cell>
          <table:table-cell table:style-name="ce3" office:value-type="string" calcext:value-type="string">
            <text:p>n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L</text:p>
          </table:table-cell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0-field</text:p>
          </table:table-cell>
          <table:table-cell table:formula="of:=[.B32]*[.F29]/[.B5]" office:value-type="float" office:value="0.211428193075306" calcext:value-type="float">
            <text:p>0.211428193075306</text:p>
          </table:table-cell>
          <table:table-cell table:style-name="ce3" office:value-type="string" calcext:value-type="string">
            <text:p>T</text:p>
          </table:table-cell>
          <table:table-cell table:number-columns-repeated="5"/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2"/>
          <table:table-cell table:style-name="Default"/>
          <table:table-cell table:number-columns-repeated="9"/>
        </table:table-row>
        <table:table-row table:style-name="ro1">
          <table:table-cell office:value-type="string" calcext:value-type="string">
            <text:p>wrong, uses IB, w0,...that are set in other part of this file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office:value-type="string" calcext:value-type="string">
            <text:p>r_eff (single loop)</text:p>
          </table:table-cell>
          <table:table-cell office:value-type="float" office:value="0.0003" calcext:value-type="float">
            <text:p>0.000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oil radius</text:p>
          </table:table-cell>
          <table:table-cell table:formula="of:=[.G6] * 10^(-9)/(2*[.B39]) * 10^6" office:value-type="float" office:value="7.37801463899236" calcext:value-type="float">
            <text:p>7.37801463899236</text:p>
          </table:table-cell>
          <table:table-cell table:style-name="ce3" office:value-type="string" calcext:value-type="string">
            <text:p>10^-6 m 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_eff (long coil)</text:p>
          </table:table-cell>
          <table:table-cell office:value-type="float" office:value="0.0003" calcext:value-type="float">
            <text:p>0.0003</text:p>
          </table:table-cell>
          <table:table-cell table:style-name="Default" office:value-type="float" office:value="1" calcext:value-type="float">
            <text:p>1</text:p>
          </table:table-cell>
          <table:table-cell/>
          <table:table-cell office:value-type="string" calcext:value-type="string">
            <text:p>nwind </text:p>
          </table:table-cell>
          <table:table-cell table:formula="of:= [.B40]" office:value-type="float" office:value="0.0003" calcext:value-type="float">
            <text:p>0.0003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/>
          <table:table-cell table:number-columns-repeated="9"/>
        </table:table-row>
        <table:table-row table:style-name="ro1" table:number-rows-repeated="1048534">
          <table:table-cell table:number-columns-repeated="12"/>
        </table:table-row>
        <table:table-row table:style-name="ro1"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6-02">00/00/0000</text:date>, <text:time style:data-style-name="N2" text:time-value="19:04:06.75223392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6-05-07T11:01:27.036202539</meta:creation-date>
    <meta:generator>LibreOffice/6.0.7.3$Linux_X86_64 LibreOffice_project/00m0$Build-3</meta:generator>
    <dc:date>2026-06-02T19:16:09.379170248</dc:date>
    <meta:editing-duration>PT1H55M8S</meta:editing-duration>
    <meta:editing-cycles>11</meta:editing-cycles>
    <meta:document-statistic meta:table-count="1" meta:cell-count="194" meta:object-count="0"/>
  </office:meta>
</office:document-meta>
</file>