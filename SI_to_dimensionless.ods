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Sans" svg:font-family="LibreSans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4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tural constants 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 Unit 1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 Unit 2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1.602 * 10^(-19)" office:value-type="float" office:value="1.602E-019" calcext:value-type="float">
            <text:p>1.602E-19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w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r </text:p>
          </table:table-cell>
          <table:table-cell table:formula="of:=1.054 * 10^(-34)" office:value-type="float" office:value="1.054E-034" calcext:value-type="float">
            <text:p>1.054E-34</text:p>
          </table:table-cell>
          <table:table-cell office:value-type="string" calcext:value-type="string">
            <text:p>AVs^2</text:p>
          </table:table-cell>
          <table:table-cell/>
          <table:table-cell office:value-type="string" calcext:value-type="string">
            <text:p>magnetic field</text:p>
          </table:table-cell>
          <table:table-cell office:value-type="string" calcext:value-type="string">
            <text:p>gamma/w0 </text:p>
          </table:table-cell>
          <table:table-cell table:formula="of:=[.B5]/[.B11]" office:value-type="float" office:value="1.76086268233708" calcext:value-type="float">
            <text:p>1.760862682337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gnetic 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B</text:p>
          </table:table-cell>
          <table:table-cell table:formula="of:=1.308 * 10^(-23)" office:value-type="float" office:value="1.308E-023" calcext:value-type="float">
            <text:p>1.308E-23</text:p>
          </table:table-cell>
          <table:table-cell office:value-type="string" calcext:value-type="string">
            <text:p>J/K</text:p>
          </table:table-cell>
          <table:table-cell/>
          <table:table-cell office:value-type="string" calcext:value-type="string">
            <text:p>voltage </text:p>
          </table:table-cell>
          <table:table-cell office:value-type="string" calcext:value-type="string">
            <text:p>IB/Gmo</text:p>
          </table:table-cell>
          <table:table-cell table:formula="of:=[.B13] / ([.B14])"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 </text:p>
          </table:table-cell>
          <table:table-cell office:value-type="string" calcext:value-type="string">
            <text:p>hbar w0 / e</text:p>
          </table:table-cell>
          <table:table-cell table:formula="of:=[.B3]*[.B11] / [.B2] * 10^12" office:value-type="float" office:value="0.065792759051186" calcext:value-type="float">
            <text:p>0.065792759051186</text:p>
          </table:table-cell>
          <table:table-cell office:value-type="string" calcext:value-type="string">
            <text:p>fV</text:p>
          </table:table-cell>
        </table:table-row>
        <table:table-row table:style-name="ro1">
          <table:table-cell office:value-type="string" calcext:value-type="string">
            <text:p>gamma </text:p>
          </table:table-cell>
          <table:table-cell table:formula="of:=28.025 * 2 *PI()" office:value-type="float" office:value="176.086268233708" calcext:value-type="float">
            <text:p>176.086268233708</text:p>
          </table:table-cell>
          <table:table-cell office:value-type="string" calcext:value-type="string">
            <text:p>10^9/s</text:p>
          </table:table-cell>
          <table:table-cell/>
          <table:table-cell office:value-type="string" calcext:value-type="string">
            <text:p>conductance</text:p>
          </table:table-cell>
          <table:table-cell office:value-type="string" calcext:value-type="string">
            <text:p>e IB /(hbar w0)</text:p>
          </table:table-cell>
          <table:table-cell table:formula="of:=[.B2]*[.B13]*10^(-12) /[.B3]/[.B11]" office:value-type="float" office:value="30.3984819734345" calcext:value-type="float">
            <text:p>30.3984819734345</text:p>
          </table:table-cell>
          <table:table-cell office:value-type="string" calcext:value-type="string">
            <text:p>1/Ohm</text:p>
          </table:table-cell>
          <table:table-cell office:value-type="string" calcext:value-type="string">
            <text:p>conductance</text:p>
          </table:table-cell>
          <table:table-cell office:value-type="string" calcext:value-type="string">
            <text:p>1/RQ</text:p>
          </table:table-cell>
          <table:table-cell table:formula="of:=10^3/[.B7]" office:value-type="float" office:value="0.243491840607211" calcext:value-type="float">
            <text:p>0.243491840607211</text:p>
          </table:table-cell>
          <table:table-cell office:value-type="string" calcext:value-type="string">
            <text:p>10^-3/Ohm</text:p>
          </table:table-cell>
        </table:table-row>
        <table:table-row table:style-name="ro1">
          <table:table-cell office:value-type="string" calcext:value-type="string">
            <text:p>mu0</text:p>
          </table:table-cell>
          <table:table-cell table:formula="of:=1.257 * 10^(-6)" office:value-type="float" office:value="0.000001257" calcext:value-type="float">
            <text:p>1.257E-06</text:p>
          </table:table-cell>
          <table:table-cell office:value-type="string" calcext:value-type="string">
            <text:p>Tm/A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mu0 IB gamma / w0</text:p>
          </table:table-cell>
          <table:table-cell table:formula="of:=10^(-3) * [.B6]*[.B5]*[.B13]/[.B11] * 10^(9)" office:value-type="float" office:value="4.42680878339542" calcext:value-type="float">
            <text:p>4.42680878339542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leng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 = hbar / e^2</text:p>
          </table:table-cell>
          <table:table-cell table:formula="of:=[.B3] / [.B2] / [.B2]" office:value-type="float" office:value="4106.91379845106" calcext:value-type="float">
            <text:p>4106.91379845106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current </text:p>
          </table:table-cell>
          <table:table-cell office:value-type="string" calcext:value-type="string">
            <text:p>IB</text:p>
          </table:table-cell>
          <table:table-cell table:formula="of:=[.B13]"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</text:p>
          </table:table-cell>
          <table:table-cell office:value-type="string" calcext:value-type="string">
            <text:p>e w0</text:p>
          </table:table-cell>
          <table:table-cell table:formula="of:=[.B2]*[.B11] * 10^18" office:value-type="float" office:value="16.02" calcext:value-type="float">
            <text:p>16.02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ircuit Parameters</text:p>
          </table:table-cell>
          <table:table-cell table:number-columns-repeated="4"/>
          <table:table-cell table:style-name="ce1" office:value-type="string" calcext:value-type="string">
            <text:p>Dimensionless Code Parame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0 (eigenfrequenc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^9/s</text:p>
          </table:table-cell>
          <table:table-cell/>
          <table:table-cell office:value-type="string" calcext:value-type="string">
            <text:p>Oscillation Period </text:p>
          </table:table-cell>
          <table:table-cell/>
          <table:table-cell table:formula="of:=2 * PI() / [.B11]" office:value-type="float" office:value="0.0628318530717959" calcext:value-type="float">
            <text:p>0.062831853071796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 (Temperature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emperature</text:p>
          </table:table-cell>
          <table:table-cell office:value-type="string" calcext:value-type="string">
            <text:p>kB T / (hbar w0)</text:p>
          </table:table-cell>
          <table:table-cell table:formula="of:=[.B4]*[.B12]/[.B3]/10^9 / [.B11]" office:value-type="float" office:value="372.296015180266" calcext:value-type="float">
            <text:p>372.2960151802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 (bias curren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bias current </text:p>
          </table:table-cell>
          <table:table-cell office:value-type="string" calcext:value-type="string">
            <text:p>IB / I2</text:p>
          </table:table-cell>
          <table:table-cell table:formula="of:=[.B13]/[.K7]" office:value-type="float" office:value="0.124843945068664" calcext:value-type="float">
            <text:p>0.124843945068664</text:p>
          </table:table-cell>
          <table:table-cell office:value-type="string" calcext:value-type="string">
            <text:p>10^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o (TMOS cond.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^-3 /Ohm</text:p>
          </table:table-cell>
          <table:table-cell/>
          <table:table-cell office:value-type="string" calcext:value-type="string">
            <text:p>conductance</text:p>
          </table:table-cell>
          <table:table-cell office:value-type="string" calcext:value-type="string">
            <text:p>Gmo / G1</text:p>
          </table:table-cell>
          <table:table-cell table:formula="of:=[.B14]*10^-3/[.G5]" office:value-type="float" office:value="0.000164481897627965" calcext:value-type="float">
            <text:p>0.000164481897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uctance</text:p>
          </table:table-cell>
          <table:table-cell office:value-type="string" calcext:value-type="string">
            <text:p>Gmo / G2</text:p>
          </table:table-cell>
          <table:table-cell table:formula="of:=[.B14]/[.K5]" office:value-type="float" office:value="20.5345689922553" calcext:value-type="float">
            <text:p>20.534568992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ber of spins</text:p>
          </table:table-cell>
          <table:table-cell office:value-type="string" calcext:value-type="string">
            <text:p>Nspi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^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 relax. time T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Spin relax. time T1</text:p>
          </table:table-cell>
          <table:table-cell office:value-type="string" calcext:value-type="string">
            <text:p>T1 w0</text:p>
          </table:table-cell>
          <table:table-cell table:formula="of:=[.B16]*[.B1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 relax. time T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Spin relax. time T2</text:p>
          </table:table-cell>
          <table:table-cell office:value-type="string" calcext:value-type="string">
            <text:p>T2 w0</text:p>
          </table:table-cell>
          <table:table-cell table:formula="of:=[.B17]*[.B1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l radi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^-6 m</text:p>
          </table:table-cell>
          <table:table-cell/>
          <table:table-cell office:value-type="string" calcext:value-type="string">
            <text:p>Coil radius</text:p>
          </table:table-cell>
          <table:table-cell office:value-type="string" calcext:value-type="string">
            <text:p>r / r1</text:p>
          </table:table-cell>
          <table:table-cell table:formula="of:=[.B18]/[.G6] * 1000" office:value-type="float" office:value="1129.48181063401" calcext:value-type="float">
            <text:p>1129.481810634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r_eff (single loop)</text:p>
          </table:table-cell>
          <table:table-cell office:value-type="string" calcext:value-type="string">
            <text:p>r1 /(2r)</text:p>
          </table:table-cell>
          <table:table-cell table:formula="of:=[.G6]/(2 *[.B18])/1000" office:value-type="float" office:value="0.000442680878339542" calcext:value-type="float">
            <text:p>0.0004426808783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nding density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^6/m</text:p>
          </table:table-cell>
          <table:table-cell/>
          <table:table-cell office:value-type="string" calcext:value-type="string">
            <text:p>r_eff (long coil)</text:p>
          </table:table-cell>
          <table:table-cell office:value-type="string" calcext:value-type="string">
            <text:p>R1 * nwind</text:p>
          </table:table-cell>
          <table:table-cell table:formula="of:=[.B20]*[.G6]*10^(6) *10^(-9)" office:value-type="float" office:value="0.00442680878339542" calcext:value-type="float">
            <text:p>0.00442680878339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ternal B0-fie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Larmor frequency </text:p>
          </table:table-cell>
          <table:table-cell office:value-type="string" calcext:value-type="string">
            <text:p>gamma B0 / w0</text:p>
          </table:table-cell>
          <table:table-cell table:formula="of:=[.B5]*[.B22]/[.B11]" office:value-type="float" office:value="0.44021567058427" calcext:value-type="float">
            <text:p>0.440215670584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ffective coupling K</text:p>
          </table:table-cell>
          <table:table-cell office:value-type="string" calcext:value-type="string">
            <text:p>K</text:p>
          </table:table-cell>
          <table:table-cell table:formula="of:=[.G15]*10^(12)/4 /[.G12] * [.G22]*[.G14]*[.G19] /[.G13] / 10^6" office:value-type="float" office:value="0.00482743613931407" calcext:value-type="float">
            <text:p>0.0048274361393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Reverse Calculation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/>
          <table:table-cell table:style-name="ce1" office:value-type="string" calcext:value-type="string">
            <text:p>Physical Units 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emperature</text:p>
          </table:table-cell>
          <table:table-cell table:formula="of:=[.B28]" office:value-type="float" office:value="300" calcext:value-type="float">
            <text:p>300</text:p>
          </table:table-cell>
          <table:table-cell table:style-name="ce3"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b T /(hbar w0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0</text:p>
          </table:table-cell>
          <table:table-cell table:formula="of:=[.B4]*[.B28]/[.B3]/[.B29]*10^(-9)" office:value-type="float" office:value="148.918406072106" calcext:value-type="float">
            <text:p>148.918406072106</text:p>
          </table:table-cell>
          <table:table-cell table:style-name="ce3" office:value-type="string" calcext:value-type="string">
            <text:p>10^9 / 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 w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1</text:p>
          </table:table-cell>
          <table:table-cell table:formula="of:=[.B30]/[.F29]" office:value-type="float" office:value="6.71508664627931" calcext:value-type="float">
            <text:p>6.71508664627931</text:p>
          </table:table-cell>
          <table:table-cell table:style-name="ce3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 w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</text:p>
          </table:table-cell>
          <table:table-cell table:formula="of:=[.B31]/[.F29]" office:value-type="float" office:value="6.71508664627931" calcext:value-type="float">
            <text:p>6.71508664627931</text:p>
          </table:table-cell>
          <table:table-cell table:style-name="ce3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0-field</text:p>
          </table:table-cell>
          <table:table-cell table:formula="of:=[.B32]*[.F29]/[.B5]" office:value-type="float" office:value="0.211428193075306" calcext:value-type="float">
            <text:p>0.211428193075306</text:p>
          </table:table-cell>
          <table:table-cell table:style-name="ce3" office:value-type="string" calcext:value-type="string">
            <text:p>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rong, uses IB, w0,...that are set in other part of this fil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r_eff (single loop)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il radius</text:p>
          </table:table-cell>
          <table:table-cell table:formula="of:=[.G6] * 10^(-9)/(2*[.B39]) * 10^6" office:value-type="float" office:value="7.37801463899236" calcext:value-type="float">
            <text:p>7.37801463899236</text:p>
          </table:table-cell>
          <table:table-cell table:style-name="ce3" office:value-type="string" calcext:value-type="string">
            <text:p>10^-6 m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eff (long coil)</text:p>
          </table:table-cell>
          <table:table-cell office:value-type="float" office:value="0.0003" calcext:value-type="float">
            <text:p>0.000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nwind </text:p>
          </table:table-cell>
          <table:table-cell table:formula="of:= [.B40]" office:value-type="float" office:value="0.0003" calcext:value-type="float">
            <text:p>0.0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Sans" svg:font-family="LibreSans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07T11:01:27.036202539</meta:creation-date>
    <meta:generator>LibreOffice/6.0.7.3$Linux_X86_64 LibreOffice_project/00m0$Build-3</meta:generator>
    <dc:date>2026-05-07T13:40:46.272838127</dc:date>
    <meta:editing-duration>PT1H43M5S</meta:editing-duration>
    <meta:editing-cycles>9</meta:editing-cycles>
    <meta:document-statistic meta:table-count="1" meta:cell-count="194" meta:object-count="0"/>
  </office:meta>
</office:document-meta>
</file>